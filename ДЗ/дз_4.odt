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 style:list-style-name="WW8Num3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officeooo:rsid="000fde59" officeooo:paragraph-rsid="000fde59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officeooo:rsid="0013e6da" officeooo:paragraph-rsid="001404f2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officeooo:rsid="0007d430" officeooo:paragraph-rsid="000ee64e" style:font-size-asian="14pt" style:font-size-complex="14pt"/>
    </style:style>
    <style:style style:name="P7" style:family="paragraph" style:parent-style-name="Standard">
      <style:text-properties fo:font-size="14pt" officeooo:rsid="0007d430" officeooo:paragraph-rsid="0007d43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paragraph-rsid="00034284" style:font-size-asian="14pt" style:font-size-complex="14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fo:color="#ffffff" fo:font-size="14pt" fo:language="en" fo:country="US" style:text-underline-style="solid" style:text-underline-width="bold" style:text-underline-color="font-color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.2917in" fo:margin-right="0in" fo:text-align="justify" style:justify-single-word="false" fo:text-indent="0in" style:auto-text-indent="false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officeooo:paragraph-rsid="0012ed56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orphans="2" fo:widows="2" fo:text-indent="0in" style:auto-text-indent="false" fo:background-color="transparent" style:writing-mode="lr-tb"/>
      <style:text-properties fo:color="#000000" officeooo:paragraph-rsid="0016aaaf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15%" fo:orphans="2" fo:widows="2" fo:text-indent="0in" style:auto-text-indent="false" style:page-number="auto" fo:background-color="transparent" style:writing-mode="lr-tb"/>
      <style:text-properties fo:font-size="14pt" officeooo:rsid="001838c8" officeooo:paragraph-rsid="001a40e4" style:font-size-asian="14pt" style:font-size-complex="14pt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fo:color="#000000" officeooo:paragraph-rsid="0016aaaf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115%" fo:orphans="2" fo:widows="2" fo:text-indent="0.25in" style:auto-text-indent="false" style:page-number="auto" fo:background-color="transparent" style:writing-mode="lr-tb"/>
      <style:text-properties fo:font-size="14pt" officeooo:rsid="00174424" officeooo:paragraph-rsid="00174424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.25in" fo:margin-right="0in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fo:font-weight="normal" officeooo:paragraph-rsid="0016aaaf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0fde59" style:font-size-asian="14pt" style:font-size-complex="14pt"/>
    </style:style>
    <style:style style:name="T8" style:family="text">
      <style:text-properties fo:font-size="14pt" fo:language="en" fo:country="US" officeooo:rsid="0016aaaf" style:font-size-asian="14pt" style:font-size-complex="14pt"/>
    </style:style>
    <style:style style:name="T9" style:family="text">
      <style:text-properties style:text-position="sub 58%"/>
    </style:style>
    <style:style style:name="T10" style:family="text">
      <style:text-properties style:text-position="sub 58%" fo:font-size="14pt" style:font-size-asian="14pt" style:font-size-complex="14pt"/>
    </style:style>
    <style:style style:name="T11" style:family="text">
      <style:text-properties style:text-position="sub 58%" fo:font-size="14pt" fo:language="en" fo:country="US" style:font-size-asian="14pt" style:font-size-complex="14pt"/>
    </style:style>
    <style:style style:name="T12" style:family="text">
      <style:text-properties style:text-position="sub 58%" fo:font-size="14pt" fo:language="en" fo:country="US" officeooo:rsid="000fde59" style:font-size-asian="14pt" style:font-size-complex="14pt"/>
    </style:style>
    <style:style style:name="T13" style:family="text">
      <style:text-properties style:text-position="sub 58%" fo:font-size="14pt" fo:language="en" fo:country="US" style:text-underline-style="solid" style:text-underline-width="bold" style:text-underline-color="font-color" style:font-size-asian="14pt" style:font-size-complex="14pt"/>
    </style:style>
    <style:style style:name="T14" style:family="text">
      <style:text-properties style:text-position="sub 58%" officeooo:rsid="000ee64e"/>
    </style:style>
    <style:style style:name="T15" style:family="text">
      <style:text-properties style:text-position="sub 58%" officeooo:rsid="001404f2"/>
    </style:style>
    <style:style style:name="T16" style:family="text">
      <style:text-properties fo:color="#ffffff" style:text-position="sub 58%" fo:font-size="14pt" fo:language="en" fo:country="US" style:text-underline-style="solid" style:text-underline-width="bold" style:text-underline-color="font-color" style:font-size-asian="14pt" style:font-size-complex="14pt"/>
    </style:style>
    <style:style style:name="T17" style:family="text">
      <style:text-properties fo:color="#ffffff" fo:font-size="14pt" fo:language="en" fo:country="US" style:text-underline-style="solid" style:text-underline-width="bold" style:text-underline-color="font-color" style:font-size-asian="14pt" style:font-size-complex="14pt"/>
    </style:style>
    <style:style style:name="T18" style:family="text">
      <style:text-properties fo:color="#ffffff" style:text-position="0% 100%" fo:font-size="14pt" fo:language="en" fo:country="US" style:text-underline-style="solid" style:text-underline-width="bold" style:text-underline-color="font-color" style:font-size-asian="14pt" style:font-size-complex="14pt"/>
    </style:style>
    <style:style style:name="T19" style:family="text">
      <style:text-properties fo:language="ru" fo:country="RU"/>
    </style:style>
    <style:style style:name="T20" style:family="text">
      <style:text-properties fo:language="en" fo:country="US"/>
    </style:style>
    <style:style style:name="T21" style:family="text">
      <style:text-properties officeooo:rsid="001f96eb"/>
    </style:style>
    <style:style style:name="T22" style:family="text">
      <style:text-properties officeooo:rsid="0004a560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size="14pt" fo:language="en" fo:country="US" style:font-size-asian="14pt" style:font-size-complex="14pt"/>
    </style:style>
    <style:style style:name="T25" style:family="text">
      <style:text-properties style:text-position="0% 100%" fo:font-size="14pt" fo:language="en" fo:country="US" officeooo:rsid="000fde59" style:font-size-asian="14pt" style:font-size-complex="14pt"/>
    </style:style>
    <style:style style:name="T26" style:family="text">
      <style:text-properties style:text-position="0% 100%" fo:font-size="14pt" fo:language="en" fo:country="US" officeooo:rsid="0016aaaf" style:font-size-asian="14pt" style:font-size-complex="14pt"/>
    </style:style>
    <style:style style:name="T27" style:family="text">
      <style:text-properties style:text-position="0% 100%" fo:font-size="14pt" fo:language="en" fo:country="US" fo:font-weight="normal" officeooo:rsid="0016aaaf" style:font-size-asian="14pt" style:font-weight-asian="normal" style:font-size-complex="14pt" style:font-weight-complex="normal"/>
    </style:style>
    <style:style style:name="T28" style:family="text">
      <style:text-properties style:text-position="0% 100%" fo:font-size="14pt" style:font-size-asian="14pt" style:font-size-complex="14pt"/>
    </style:style>
    <style:style style:name="T29" style:family="text">
      <style:text-properties style:text-position="0% 100%" fo:font-size="14pt" officeooo:rsid="000fde59" style:font-size-asian="14pt" style:font-size-complex="14pt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officeooo:rsid="000fde59"/>
    </style:style>
    <style:style style:name="T32" style:family="text">
      <style:text-properties style:text-position="0% 100%" officeooo:rsid="001404f2"/>
    </style:style>
    <style:style style:name="T33" style:family="text">
      <style:text-properties officeooo:rsid="000ee64e"/>
    </style:style>
    <style:style style:name="T34" style:family="text">
      <style:text-properties officeooo:rsid="0012ed56"/>
    </style:style>
    <style:style style:name="T35" style:family="text">
      <style:text-properties fo:font-variant="normal" fo:text-transform="none" style:text-position="0% 100%" fo:letter-spacing="normal" fo:language="en" fo:country="US"/>
    </style:style>
    <style:style style:name="T36" style:family="text">
      <style:text-properties fo:font-variant="normal" fo:text-transform="none" style:text-position="0% 100%" fo:font-size="14pt" fo:letter-spacing="normal" fo:language="en" fo:country="US" fo:font-weight="normal" officeooo:rsid="0016aaaf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style:text-position="0% 100%" fo:font-size="14pt" fo:letter-spacing="normal" fo:language="en" fo:country="US" fo:font-weight="normal" officeooo:rsid="000fde59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style:text-position="sub 58%" fo:font-size="14pt" fo:letter-spacing="normal" fo:language="en" fo:country="US" fo:font-weight="normal" officeooo:rsid="000fde59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style:text-position="sub 58%" fo:font-size="14pt" fo:letter-spacing="normal" fo:language="en" fo:country="US" fo:font-weight="normal" officeooo:rsid="0016aaaf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text-position="0% 100%" fo:letter-spacing="normal" fo:language="en" fo:country="US"/>
    </style:style>
    <style:style style:name="T41" style:family="text">
      <style:text-properties fo:font-variant="normal" fo:text-transform="none" fo:color="#000000" style:text-position="0% 100%" fo:letter-spacing="normal" fo:language="en" fo:country="US" fo:font-weight="normal" style:font-weight-asian="normal" style:font-weight-complex="normal"/>
    </style:style>
    <style:style style:name="T42" style:family="text">
      <style:text-properties fo:font-variant="normal" fo:text-transform="none" fo:color="#000000" style:text-position="0% 100%" fo:letter-spacing="normal" fo:language="en" fo:country="US" fo:font-weight="normal" officeooo:rsid="0016aaaf" style:font-weight-asian="normal" style:font-weight-complex="normal"/>
    </style:style>
    <style:style style:name="T43" style:family="text">
      <style:text-properties fo:font-variant="normal" fo:text-transform="none" fo:color="#000000" style:text-position="0% 100%" fo:letter-spacing="normal" fo:language="en" fo:country="US" fo:font-weight="normal" officeooo:rsid="00188111" style:font-weight-asian="normal" style:font-weight-complex="normal"/>
    </style:style>
    <style:style style:name="T44" style:family="text">
      <style:text-properties fo:font-variant="normal" fo:text-transform="none" fo:color="#000000" style:text-position="0% 100%" fo:letter-spacing="normal" fo:language="en" fo:country="US" fo:font-weight="normal" officeooo:rsid="001a40e4" style:font-weight-asian="normal" style:font-weight-complex="normal"/>
    </style:style>
    <style:style style:name="T45" style:family="text">
      <style:text-properties fo:font-variant="normal" fo:text-transform="none" fo:color="#000000" style:text-position="0% 100%" fo:letter-spacing="normal" fo:language="en" fo:country="US" officeooo:rsid="00188111"/>
    </style:style>
    <style:style style:name="T46" style:family="text">
      <style:text-properties fo:font-variant="normal" fo:text-transform="none" fo:color="#000000" style:text-position="0% 100%" fo:letter-spacing="normal" fo:language="en" fo:country="US" officeooo:rsid="001a40e4"/>
    </style:style>
    <style:style style:name="T47" style:family="text">
      <style:text-properties fo:font-variant="normal" fo:text-transform="none" fo:color="#000000" style:text-position="sub 58%" fo:letter-spacing="normal" fo:language="en" fo:country="US"/>
    </style:style>
    <style:style style:name="T48" style:family="text">
      <style:text-properties fo:font-variant="normal" fo:text-transform="none" fo:color="#000000" style:text-position="sub 58%" fo:letter-spacing="normal" fo:language="en" fo:country="US" fo:font-weight="normal" officeooo:rsid="001a40e4" style:font-weight-asian="normal" style:font-weight-complex="normal"/>
    </style:style>
    <style:style style:name="T49" style:family="text">
      <style:text-properties officeooo:rsid="00174424"/>
    </style:style>
    <style:style style:name="T50" style:family="text">
      <style:text-properties officeooo:rsid="001d10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и науки Российской Федерации</text:p>
      <text:p text:style-name="P8">ФГАОУ ВПО «УрФУ имени первого Президента России Б. Н. Ельцина»</text:p>
      <text:p text:style-name="P8">ИРИТ-РТФ</text:p>
      <text:p text:style-name="P8">Центр ускоренного обучения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1">ОТЧЕТ ПО ДОМАШНЕМУ ЗАДАНИЮ </text:span><text:span text:style-name="T2">N</text:span><text:span text:style-name="T1"> 4</text:span></text:p>
      <text:p text:style-name="P8"/>
      <text:p text:style-name="P8">по дисциплине «Язык и технологии программирования»</text:p>
      <text:p text:style-name="P8"/>
      <text:p text:style-name="P8"/>
      <text:p text:style-name="P16"><text:span text:style-name="T3">Тема: </text:span><text:span text:style-name="T4">Свойства элементарных функций алгебры логики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Студент группы <text:span text:style-name="T19">РИВ-</text:span><text:span text:style-name="T20">170027у</text:span> (<text:span text:style-name="T21">662</text:span>): <text:s text:c="19"/><text:tab/><text:tab/><text:tab/><text:span text:style-name="T50">Э. Ю. Азымов</text:span></text:p>
      <text:p text:style-name="P9">Преподаватель: <text:s text:c="44"/><text:tab/><text:tab/><text:tab/><text:tab/>С. И. Тимошенко,</text:p>
      <text:p text:style-name="P9"><text:s text:c="70"/><text:tab/><text:tab/><text:tab/><text:tab/><text:tab/>доц., к. т. н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P8">Екатеринбург 201<text:span text:style-name="T22">7</text:span></text:p>
      <text:p text:style-name="P12"><text:soft-page-break/>СОДЕРЖАНИЕ</text:p>
      <text:p text:style-name="P8"/>
      <text:p text:style-name="P15"><text:span text:style-name="T5">1 </text:span><text:span text:style-name="T3">Постановка задачи </text:span></text:p>
      <text:p text:style-name="P15"><text:span text:style-name="T3"/></text:p>
      <text:p text:style-name="P21">Просмотреть материал пп. 2.1-2.4 учебника Савельев А. Я. Основы информатики.</text:p>
      <text:p text:style-name="P9"/>
      <text:list xml:id="list696001479" text:style-name="WW8Num3">
        <text:list-item>
          <text:list>
            <text:list-item>
              <text:p text:style-name="P2">Доказать свойство дистрибутивности (распределительный закон) для дизъюнкции относительно конъюнкции (используя свойства и аксиомы):</text:p>
            </text:list-item>
          </text:list>
        </text:list-item>
      </text:list>
      <text:p text:style-name="P18"><text:span text:style-name="T6">x</text:span><text:span text:style-name="T11">1</text:span><text:span text:style-name="T24"> </text:span><text:span text:style-name="T6">+</text:span><text:span text:style-name="T24"> </text:span><text:span text:style-name="T6">x</text:span><text:span text:style-name="T11">2</text:span><text:span text:style-name="T24"> </text:span><text:span text:style-name="T6">x</text:span><text:span text:style-name="T11">3</text:span><text:span text:style-name="T24"> </text:span><text:span text:style-name="T6">=</text:span><text:span text:style-name="T24"> </text:span><text:span text:style-name="T6">(x</text:span><text:span text:style-name="T11">1</text:span><text:span text:style-name="T24"> </text:span><text:span text:style-name="T6">+</text:span><text:span text:style-name="T24"> </text:span><text:span text:style-name="T6">x</text:span><text:span text:style-name="T11">2</text:span><text:span text:style-name="T6">)</text:span><text:span text:style-name="T24"> </text:span><text:span text:style-name="T6">(x</text:span><text:span text:style-name="T11">1</text:span><text:span text:style-name="T24"> </text:span><text:span text:style-name="T6">+</text:span><text:span text:style-name="T24"> </text:span><text:span text:style-name="T6">x</text:span><text:span text:style-name="T11">3</text:span><text:span text:style-name="T6">)</text:span></text:p>
      <text:p text:style-name="P1"/>
      <text:list xml:id="list1150145215326" text:continue-numbering="true" text:style-name="WW8Num3">
        <text:list-item>
          <text:list>
            <text:list-item>
              <text:p text:style-name="P2">Доказать законы де Моргана (используя свойства и аксиомы):</text:p>
            </text:list-item>
          </text:list>
        </text:list-item>
      </text:list>
      <text:p text:style-name="P18"><text:span text:style-name="T13"><text:s text:c="3"/>_ <text:s text:c="6"/></text:span><text:span text:style-name="T16">1</text:span><text:span text:style-name="T17"> <text:s/></text:span><text:span text:style-name="T18"><text:s/></text:span><text:span text:style-name="T13"><text:s text:c="5"/></text:span><text:span text:style-name="T17"><text:s text:c="5"/></text:span><text:span text:style-name="T13"><text:s text:c="4"/></text:span><text:span text:style-name="T17"><text:s/>11 <text:s text:c="13"/></text:span></text:p>
      <text:p text:style-name="P18"><text:span text:style-name="T6">x</text:span><text:span text:style-name="T11">1</text:span><text:span text:style-name="T24"> </text:span><text:span text:style-name="T6">x</text:span><text:span text:style-name="T11">2</text:span><text:span text:style-name="T24"> </text:span><text:span text:style-name="T6">=</text:span><text:span text:style-name="T24"> </text:span><text:span text:style-name="T6">x</text:span><text:span text:style-name="T11">1</text:span><text:span text:style-name="T24"> </text:span><text:span text:style-name="T6">+</text:span><text:span text:style-name="T24"> </text:span><text:span text:style-name="T6">x</text:span><text:span text:style-name="T11">2</text:span></text:p>
      <text:p text:style-name="P18"><text:span text:style-name="T13"><text:s text:c="10"/>__ <text:s text:c="3"/></text:span><text:span text:style-name="T16">1</text:span><text:span text:style-name="T17"> <text:s text:c="2"/></text:span><text:span text:style-name="T13"><text:s text:c="4"/></text:span><text:span text:style-name="T17"><text:s text:c="2"/></text:span><text:span text:style-name="T13"><text:s text:c="4"/></text:span><text:span text:style-name="T17"><text:s/>11 <text:s text:c="13"/></text:span></text:p>
      <text:p text:style-name="P18"><text:span text:style-name="T6">x</text:span><text:span text:style-name="T11">1</text:span><text:span text:style-name="T24"> </text:span><text:span text:style-name="T6">+</text:span><text:span text:style-name="T24"> </text:span><text:span text:style-name="T6">x</text:span><text:span text:style-name="T11">2</text:span><text:span text:style-name="T24"> </text:span><text:span text:style-name="T6">=</text:span><text:span text:style-name="T24"> </text:span><text:span text:style-name="T6">x</text:span><text:span text:style-name="T11">1</text:span><text:span text:style-name="T24"> </text:span><text:span text:style-name="T6">x</text:span><text:span text:style-name="T11">2</text:span></text:p>
      <text:p text:style-name="P13"/>
      <text:list xml:id="list1150183852188" text:continue-numbering="true" text:style-name="WW8Num3">
        <text:list-item>
          <text:list>
            <text:list-item>
              <text:p text:style-name="P2">Используя свойства и аксиомы логических функций упростить логическое выражение.</text:p>
            </text:list-item>
          </text:list>
        </text:list-item>
      </text:list>
      <text:p text:style-name="P19"><text:span text:style-name="T4">11) (</text:span><text:span text:style-name="T24">x</text:span><text:span text:style-name="T10">1</text:span><text:span text:style-name="T28"> </text:span><text:span text:style-name="T29">+ </text:span><text:span text:style-name="T24">x</text:span><text:span text:style-name="T10">2</text:span><text:span text:style-name="T28"> </text:span><text:span text:style-name="T29">+ </text:span><text:span text:style-name="T24">x</text:span><text:span text:style-name="T10">1</text:span><text:span text:style-name="T24">x</text:span><text:span text:style-name="T10">2</text:span><text:span text:style-name="T4">) </text:span><text:span text:style-name="T6">x</text:span><text:span text:style-name="T10">1</text:span></text:p>
      <text:p text:style-name="P17"><text:s/></text:p>
      <text:p text:style-name="P11">2 Результаты проделанной работы</text:p>
      <text:p text:style-name="P3"/>
      <text:p text:style-name="P7">1) <text:span text:style-name="T33">Докажем, что x</text:span><text:span text:style-name="T14">1</text:span><text:span text:style-name="T33"> + x</text:span><text:span text:style-name="T14">2</text:span><text:span text:style-name="T33">x</text:span><text:span text:style-name="T14">3</text:span><text:span text:style-name="T33"> = (x</text:span><text:span text:style-name="T14">1</text:span><text:span text:style-name="T33"> + x</text:span><text:span text:style-name="T14">2</text:span><text:span text:style-name="T33">) (x</text:span><text:span text:style-name="T14">1</text:span><text:span text:style-name="T33"> + x</text:span><text:span text:style-name="T14">3</text:span><text:span text:style-name="T33">);</text:span></text:p>
      <text:p text:style-name="P7"/>
      <text:p text:style-name="P6"><text:span text:style-name="T33">(x</text:span><text:span text:style-name="T14">1</text:span><text:span text:style-name="T33"> + x</text:span><text:span text:style-name="T14">2</text:span><text:span text:style-name="T33">) (x</text:span><text:span text:style-name="T14">1</text:span><text:span text:style-name="T33"> + x</text:span><text:span text:style-name="T14">3</text:span><text:span text:style-name="T33">) = x</text:span><text:span text:style-name="T14">1</text:span><text:span text:style-name="T33">x</text:span><text:span text:style-name="T14">1</text:span><text:span text:style-name="T33"> + x</text:span><text:span text:style-name="T14">1</text:span><text:span text:style-name="T33">x</text:span><text:span text:style-name="T14">3</text:span><text:span text:style-name="T33"> + x</text:span><text:span text:style-name="T14">2</text:span><text:span text:style-name="T33">x</text:span><text:span text:style-name="T14">1</text:span><text:span text:style-name="T33"> + x</text:span><text:span text:style-name="T14">2</text:span><text:span text:style-name="T33">x</text:span><text:span text:style-name="T14">3</text:span><text:span text:style-name="T33"> = x</text:span><text:span text:style-name="T14">1</text:span><text:span text:style-name="T33"> + x</text:span><text:span text:style-name="T14">1</text:span><text:span text:style-name="T33">x</text:span><text:span text:style-name="T14">2</text:span><text:span text:style-name="T33"> + x</text:span><text:span text:style-name="T14">1</text:span><text:span text:style-name="T33">x</text:span><text:span text:style-name="T14">3</text:span><text:span text:style-name="T33"> + x</text:span><text:span text:style-name="T14">2</text:span><text:span text:style-name="T33">x</text:span><text:span text:style-name="T14">3</text:span><text:span text:style-name="T33"> = x</text:span><text:span text:style-name="T14">1</text:span><text:span text:style-name="T33">(1 + x</text:span><text:span text:style-name="T14">2</text:span><text:span text:style-name="T33"> + x</text:span><text:span text:style-name="T14">3</text:span><text:span text:style-name="T33">) + x</text:span><text:span text:style-name="T14">2</text:span><text:span text:style-name="T33">x</text:span><text:span text:style-name="T14">3</text:span><text:span text:style-name="T33"> = x</text:span><text:span text:style-name="T14">1</text:span><text:span text:style-name="T33"> + x</text:span><text:span text:style-name="T14">2</text:span><text:span text:style-name="T33">x</text:span><text:span text:style-name="T14">3</text:span><text:span text:style-name="T33">. Доказано.</text:span></text:p>
      <text:p text:style-name="P6"/>
      <text:p text:style-name="P4">2) <text:span text:style-name="T49">Доказать законы де Моргана:</text:span></text:p>
      <text:p text:style-name="P26">a) !(x<text:span text:style-name="T9">1</text:span>x<text:span text:style-name="T9">2</text:span>) = !x<text:span text:style-name="T9">1</text:span> + !x<text:span text:style-name="T9">2</text:span></text:p>
      <text:p text:style-name="P23">m <text:span text:style-name="T40">∈ !(x</text:span><text:span text:style-name="T47">1</text:span><text:span text:style-name="T40"> </text:span><text:span text:style-name="T45">^ </text:span><text:span text:style-name="T40">x</text:span><text:span text:style-name="T47">2</text:span><text:span text:style-name="T40">) =&gt; </text:span><text:span text:style-name="T46">(m </text:span><text:span text:style-name="T42">∉ </text:span><text:span text:style-name="T44">x</text:span><text:span text:style-name="T48">1</text:span><text:span text:style-name="T44">) + (m </text:span><text:span text:style-name="T42">∉ </text:span><text:span text:style-name="T44">x</text:span><text:span text:style-name="T48">2</text:span><text:span text:style-name="T44">) =&gt; m ∈ (!x</text:span><text:span text:style-name="T48">1</text:span><text:span text:style-name="T44"> + !x</text:span><text:span text:style-name="T48">2</text:span><text:span text:style-name="T44">). Доказано.</text:span></text:p>
      <text:p text:style-name="P4"/>
      <text:p text:style-name="P27"><text:span text:style-name="T8">b) </text:span><text:span text:style-name="T7">!</text:span><text:span text:style-name="T8">(</text:span><text:span text:style-name="T7">x</text:span><text:span text:style-name="T12">1</text:span><text:span text:style-name="T25"> </text:span><text:span text:style-name="T7">+</text:span><text:span text:style-name="T25"> </text:span><text:span text:style-name="T7">x</text:span><text:span text:style-name="T12">2</text:span><text:span text:style-name="T26">)</text:span><text:span text:style-name="T25"> </text:span><text:span text:style-name="T7">=</text:span><text:span text:style-name="T25"> !</text:span><text:span text:style-name="T7">x</text:span><text:span text:style-name="T12">1</text:span><text:span text:style-name="T25"> !</text:span><text:span text:style-name="T7">x</text:span><text:span text:style-name="T12">2</text:span></text:p>
      <text:p text:style-name="P24"><text:span text:style-name="T27">m </text:span><text:span text:style-name="T35">∈</text:span><text:span text:style-name="T36"> </text:span><text:span text:style-name="T37">!</text:span><text:span text:style-name="T36">(</text:span><text:span text:style-name="T37">x</text:span><text:span text:style-name="T38">1</text:span><text:span text:style-name="T37"> + x</text:span><text:span text:style-name="T38">2</text:span><text:span text:style-name="T36">) =&gt; m ∉ (x</text:span><text:span text:style-name="T39">1</text:span><text:span text:style-name="T36"> + x</text:span><text:span text:style-name="T39">2</text:span><text:span text:style-name="T36">) =&gt; (m ∉ x</text:span><text:span text:style-name="T39">1</text:span><text:span text:style-name="T36">) ^ (m ∉ x</text:span><text:span text:style-name="T39">2</text:span><text:span text:style-name="T36">) =&gt; (m ∈ !x</text:span><text:span text:style-name="T39">1</text:span><text:span text:style-name="T36">) ^ (m ∈ !x</text:span><text:span text:style-name="T39">2</text:span><text:span text:style-name="T36">) =&gt;</text:span></text:p>
      <text:p text:style-name="P22"><text:span text:style-name="T36">=&gt; m ∈ (!x</text:span><text:span text:style-name="T39">1</text:span><text:span text:style-name="T36"> ^ !x</text:span><text:span text:style-name="T39">2</text:span><text:span text:style-name="T36">). Доказано.</text:span></text:p>
      <text:p text:style-name="P4"/>
      <text:p text:style-name="P5">3) (<text:span text:style-name="T30">x</text:span><text:span text:style-name="T9">1</text:span><text:span text:style-name="T23"> </text:span><text:span text:style-name="T31">+ </text:span><text:span text:style-name="T30">x</text:span><text:span text:style-name="T9">2</text:span><text:span text:style-name="T23"> </text:span><text:span text:style-name="T31">+ </text:span><text:span text:style-name="T30">x</text:span><text:span text:style-name="T9">1</text:span><text:span text:style-name="T30">x</text:span><text:span text:style-name="T9">2</text:span>) <text:span text:style-name="T20">x</text:span><text:span text:style-name="T9">1</text:span><text:span text:style-name="T23"> </text:span><text:span text:style-name="T32">~ (x</text:span><text:span text:style-name="T15">1 </text:span><text:span text:style-name="T32">+ x</text:span><text:span text:style-name="T15">2</text:span><text:span text:style-name="T32">)x</text:span><text:span text:style-name="T15">1</text:span><text:span text:style-name="T32"> ~ x</text:span><text:span text:style-name="T15">1</text:span></text:p>
      <text:p text:style-name="P8"/>
      <text:p text:style-name="Standard"><text:span text:style-name="T5">3 </text:span><text:span text:style-name="T3">Анализ полученных результатов</text:span></text:p>
      <text:p text:style-name="P3"/>
      <text:p text:style-name="P20"><text:span text:style-name="T34">В результате выполнения работы были получены навыки по доказательству свойства дистрибутивности и законов де Моргана, а так же по упрощению логических выраж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format="1">
        <style:list-level-properties text:min-label-width="0.2917in"/>
      </text:list-level-style-number>
      <text:list-level-style-number text:level="2" style:num-format="1" text:display-levels="2">
        <style:list-level-properties text:min-label-width="0.2917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7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1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.25in"/>
      </text:list-level-style-number>
      <text:list-level-style-number text:level="9" style:num-format="1" text:display-levels="9">
        <style:list-level-properties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7-12-17T22:20:00</meta:creation-date>
    <dc:date>2017-09-29T00:11:49.926947340</dc:date>
    <meta:editing-cycles>53</meta:editing-cycles>
    <meta:editing-duration>PT2H45M59S</meta:editing-duration>
    <meta:document-statistic meta:table-count="0" meta:image-count="0" meta:object-count="0" meta:page-count="2" meta:paragraph-count="36" meta:word-count="302" meta:character-count="1780" meta:non-whitespace-character-count="1289"/>
    <meta:user-defined meta:name="Поле 1"/>
    <meta:user-defined meta:name="Поле 2"/>
    <meta:user-defined meta:name="Поле 3"/>
    <meta:user-defined meta:name="Поле 4"/>
  </office:meta>
</office:document-meta>
</file>